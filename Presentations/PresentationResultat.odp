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2000001608BD23445.png" manifest:media-type="image/png"/>
  <manifest:file-entry manifest:full-path="Pictures/1000000000000412000002BC6008884F.png" manifest:media-type="image/png"/>
  <manifest:file-entry manifest:full-path="Pictures/10000000000002A7000001CC4740ACA9.png" manifest:media-type="image/png"/>
  <manifest:file-entry manifest:full-path="Pictures/1000000000000183000001A5B4E91C88.png" manifest:media-type="image/png"/>
  <manifest:file-entry manifest:full-path="Pictures/100000000000031900000343FEDE9074.png" manifest:media-type="image/png"/>
  <manifest:file-entry manifest:full-path="Pictures/10000001000004A8000002E9DB815C20.png" manifest:media-type="image/png"/>
  <manifest:file-entry manifest:full-path="Pictures/1000000000000320000001C238E571DA.png" manifest:media-type="image/png"/>
  <manifest:file-entry manifest:full-path="Pictures/10000001000004590000024C246ECB3E.png" manifest:media-type="image/png"/>
  <manifest:file-entry manifest:full-path="Pictures/10000000000003A3000002169AD7AD5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7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cm" fo:min-width="0cm" draw:shadow-opacity="50%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82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6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687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14.001cm" loext:decorative="false"/>
      <style:paragraph-properties style:writing-mode="lr-tb"/>
    </style:style>
    <style:style style:name="pr4" style:family="presentation" style:parent-style-name="Progress-title">
      <style:graphic-properties fo:min-height="2.6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0pt" style:font-size-asian="20pt" style:font-size-complex="20pt"/>
    </style:style>
    <style:style style:name="P8" style:family="paragraph">
      <style:paragraph-properties fo:margin-top="0.42cm" fo:margin-bottom="0.35cm" fo:text-align="lef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solid" draw:fill-color="#ff00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Noto Serif CJK JP:palt" style:font-size-asian="20pt" style:font-style-asian="normal" style:font-weight-asian="normal" style:font-name-complex="Noto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3465a4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style:font-name-asian="Noto Serif CJK JP:palt" style:font-size-asian="10pt" style:font-style-asian="normal" style:font-weight-asian="bold" style:font-name-complex="Noto Serif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>
        <office:forms form:automatic-focus="false" form:apply-design-mode="false"/>
        <draw:frame presentation:style-name="pr1" draw:text-style-name="P2" draw:layer="layout" svg:width="25cm" svg:height="4.687cm" svg:x="1cm" svg:y="8cm" presentation:class="title" presentation:user-transformed="true">
          <draw:text-box>
            <text:p text:style-name="P1"><text:span text:style-name="T1">LMI-Based Multirate Steady-State Kalman Filter Design: Comparison of Offline and Recursive Gains </text:span></text:p>
          </draw:text-box>
        </draw:frame>
        <draw:frame draw:style-name="gr1" draw:text-style-name="P3" draw:layer="layout" svg:width="7.5cm" svg:height="1.657cm" svg:x="0cm" svg:y="14.5cm">
          <draw:text-box>
            <text:p>Léo AHMED MUSHTAQ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21.5cm" svg:height="12.406cm" svg:x="3cm" svg:y="2.094cm">
          <draw:image xlink:href="Pictures/1000000000000262000001608BD23445.png" xlink:type="simple" xlink:show="embed" xlink:actuate="onLoad" draw:mime-type="image/png">
            <text:p/>
          </draw:image>
        </draw:frame>
        <draw:custom-shape draw:style-name="gr4" draw:text-style-name="P6" draw:layer="layout" svg:width="1.5cm" svg:height="0.5cm" svg:x="7.9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5" draw:text-style-name="P3" draw:layer="layout" svg:width="2.5cm" svg:height="1cm" svg:x="7.5cm" svg:y="1.9cm">
          <draw:text-box>
            <text:p>N = 10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rogress" presentation:presentation-page-layout-name="AL2T1">
        <office:forms form:automatic-focus="false" form:apply-design-mode="false"/>
        <draw:frame presentation:style-name="pr4" draw:layer="layout" svg:width="25cm" svg:height="2.65cm" svg:x="1.5cm" svg:y="0.35cm" presentation:class="title" presentation:user-transformed="true">
          <draw:text-box>
            <text:p>Our system</text:p>
          </draw:text-box>
        </draw:frame>
        <draw:frame draw:style-name="gr3" draw:text-style-name="P5" draw:layer="layout" svg:width="17.964cm" svg:height="12.17cm" svg:x="5cm" svg:y="3.33cm">
          <draw:image xlink:href="Pictures/10000000000002A7000001CC4740AC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13.426cm" svg:height="14.137cm" svg:x="0.574cm" svg:y="0.5cm">
          <draw:image xlink:href="Pictures/100000000000031900000343FEDE9074.png" xlink:type="simple" xlink:show="embed" xlink:actuate="onLoad" draw:mime-type="image/png">
            <text:p/>
          </draw:image>
        </draw:frame>
        <draw:frame draw:style-name="gr3" draw:text-style-name="P5" draw:layer="layout" svg:width="12.5cm" svg:height="13.599cm" svg:x="14.5cm" svg:y="0.5cm">
          <draw:image xlink:href="Pictures/1000000000000183000001A5B4E91C88.png" xlink:type="simple" xlink:show="embed" xlink:actuate="onLoad" draw:mime-type="image/png">
            <text:p/>
          </draw:image>
        </draw:frame>
        <draw:frame draw:style-name="gr6" draw:text-style-name="P7" draw:layer="layout" svg:width="18cm" svg:height="1.817cm" svg:x="0cm" svg:y="14.183cm">
          <draw:text-box>
            <text:p text:style-name="P1"><text:span text:style-name="T2">State space representation : x_cyc(k+1) = A_cyc·x_cyc(k) + Val</text:span><text:span text:style-name="T3">·w </text:span></text:p>
          </draw:text-box>
        </draw:frame>
        <draw:frame draw:style-name="gr6" draw:text-style-name="P7" draw:layer="layout" svg:width="10.5cm" svg:height="1.817cm" svg:x="18.5cm" svg:y="14.183cm">
          <draw:text-box>
            <text:p text:style-name="P1"><text:span text:style-name="T3">Measurement noise covariances 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22.941cm" svg:height="12.903cm" svg:x="4.159cm" svg:y="0.097cm">
          <draw:image xlink:href="Pictures/1000000000000320000001C238E571DA.png" xlink:type="simple" xlink:show="embed" xlink:actuate="onLoad" draw:mime-type="image/png">
            <text:p/>
          </draw:image>
        </draw:frame>
        <draw:frame draw:style-name="gr7" draw:text-style-name="P9" draw:layer="layout" svg:width="19.433cm" svg:height="1.448cm" svg:x="6.067cm" svg:y="13.052cm">
          <draw:text-box>
            <text:p text:style-name="P8"><text:span text:style-name="T3">trace(P(k)) measures the total estimation uncertainty (the sum of the error variances for position, velocity, and acceleration).</text:span></text:p>
            <text:p text:style-name="P8"><text:span text:style-name="T3"/></text:p>
          </draw:text-box>
        </draw:frame>
        <draw:frame draw:style-name="gr7" draw:text-style-name="P9" draw:layer="layout" svg:width="5.005cm" svg:height="2cm" svg:x="-0.1cm" svg:y="6.5cm">
          <draw:text-box>
            <text:p text:style-name="P1"><text:span text:style-name="T3">With arbitrary choice of P(0/0):</text:span></text:p>
            <text:p text:style-name="P1"><text:span text:style-name="T3">P0 = eye(3,3);</text:span></text:p>
          </draw:text-box>
        </draw:frame>
        <draw:custom-shape draw:style-name="gr8" draw:text-style-name="P10" draw:layer="layout" svg:width="0.5cm" svg:height="0.5cm" svg:x="11.5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0.5cm" svg:height="0.5cm" svg:x="12.3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0.5cm" svg:height="0.5cm" svg:x="13.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0.5cm" svg:height="0.5cm" svg:x="14.1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" draw:layer="layout" svg:width="2cm" svg:height="1.1cm" svg:x="12.5cm" svg:y="11.5cm">
          <draw:text-box>
            <text:p>GPS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rogress" presentation:presentation-page-layout-name="AL2T1">
        <office:forms form:automatic-focus="false" form:apply-design-mode="false"/>
        <draw:frame draw:style-name="gr10" draw:text-style-name="P5" draw:layer="layout" svg:width="24.229cm" svg:height="15.5cm" svg:x="1.771cm" svg:y="0cm">
          <draw:image xlink:href="Pictures/1000000000000412000002BC6008884F.png" xlink:type="simple" xlink:show="embed" xlink:actuate="onLoad" draw:mime-type="image/png">
            <text:p/>
          </draw:image>
        </draw:frame>
        <draw:custom-shape draw:style-name="gr11" draw:text-style-name="P6" draw:layer="layout" svg:width="0.5cm" svg:height="0.5cm" svg:x="6.9cm" svg:y="4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11" draw:layer="layout" svg:width="2.2cm" svg:height="1.419cm" svg:x="6.3cm" svg:y="3.446cm">
          <draw:text-box>
            <text:p><text:span text:style-name="T4">N = 10</text:span></text:p>
          </draw:text-box>
        </draw:frame>
        <draw:frame draw:style-name="gr13" draw:text-style-name="P12" draw:layer="layout" svg:width="2.094cm" svg:height="0.64cm" svg:x="12.906cm" svg:y="4.36cm">
          <draw:text-box>
            <text:p><text:span text:style-name="T5">~</text:span><text:span text:style-name="T6">0,28</text:span></text:p>
          </draw:text-box>
        </draw:frame>
        <draw:frame draw:style-name="gr13" draw:text-style-name="P12" draw:layer="layout" svg:width="1.594cm" svg:height="0.64cm" svg:x="12.906cm" svg:y="11.66cm">
          <draw:text-box>
            <text:p><text:span text:style-name="T5">~</text:span><text:span text:style-name="T6">0,28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25.5cm" svg:height="13.47cm" svg:x="1cm" svg:y="1.02cm">
          <draw:image xlink:href="Pictures/10000001000004590000024C246EC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23.886cm" svg:height="14.929cm" svg:x="2.114cm" svg:y="0.071cm">
          <draw:image xlink:href="Pictures/10000001000004A8000002E9DB815C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ogress" presentation:presentation-page-layout-name="AL2T1">
        <office:forms form:automatic-focus="false" form:apply-design-mode="false"/>
        <draw:frame draw:style-name="gr3" draw:text-style-name="P5" draw:layer="layout" svg:width="21.987cm" svg:height="12.611cm" svg:x="2.5cm" svg:y="0.372cm">
          <draw:image xlink:href="Pictures/10000000000003A3000002169AD7AD58.png" xlink:type="simple" xlink:show="embed" xlink:actuate="onLoad" draw:mime-type="image/png">
            <text:p/>
          </draw:image>
        </draw:frame>
        <draw:frame draw:style-name="gr7" draw:text-style-name="P13" draw:layer="layout" svg:width="13.323cm" svg:height="0.953cm" svg:x="2.5cm" svg:y="13.047cm">
          <draw:text-box>
            <text:p>https://github.com/Leoam24/lmi-multirate-kalman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  <style:text-properties fo:font-size="15pt"/>
    </style:style>
    <style:style style:name="Progress-outline6" style:family="presentation" style:parent-style-name="Progress-outline5">
      <style:paragraph-properties fo:margin-left="0cm" fo:margin-right="0cm" fo:margin-top="0cm" fo:margin-bottom="0.075cm" fo:text-indent="0cm"/>
      <style:text-properties fo:font-size="15pt"/>
    </style:style>
    <style:style style:name="Progress-outline7" style:family="presentation" style:parent-style-name="Progress-outline6">
      <style:paragraph-properties fo:margin-left="0cm" fo:margin-right="0cm" fo:margin-top="0cm" fo:margin-bottom="0.075cm" fo:text-indent="0cm"/>
      <style:text-properties fo:font-size="15pt"/>
    </style:style>
    <style:style style:name="Progress-outline8" style:family="presentation" style:parent-style-name="Progress-outline7">
      <style:paragraph-properties fo:margin-left="0cm" fo:margin-right="0cm" fo:margin-top="0cm" fo:margin-bottom="0.075cm" fo:text-indent="0cm"/>
      <style:text-properties fo:font-size="15pt"/>
    </style:style>
    <style:style style:name="Progress-outline9" style:family="presentation" style:parent-style-name="Progress-outline8">
      <style:paragraph-properties fo:margin-left="0cm" fo:margin-right="0cm" fo:margin-top="0cm" fo:margin-bottom="0.075cm" fo:text-indent="0cm"/>
      <style:text-properties fo:font-size="15pt"/>
    </style:style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16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5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P17" style:family="paragraph">
      <loext:graphic-properties draw:fill="solid" draw:fill-color="#dddddd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left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rogres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15" draw:text-style-name="MP17" draw:layer="backgroundobjects" svg:width="28cm" svg:height="11.81cm" svg:x="0cm" svg:y="0cm" svg:viewBox="0 0 28001 11811" draw:points="0,11811 0,0 28001,0 28001,7811">
        <text:p/>
      </draw:polygon>
      <draw:frame presentation:style-name="Mpr4" draw:layer="backgroundobjects" svg:width="25cm" svg:height="2.65cm" draw:transform="skewX (-2.81036687499827E-017) rotate (0.142244334037538) translate (1.295cm 9.021cm)" presentation:class="title">
        <draw:text-box>
          <text:p>Cliquez pour éditer le format du texte-titre</text:p>
        </draw:text-box>
      </draw:frame>
      <draw:frame draw:style-name="Mgr16" draw:text-style-name="MP18" draw:layer="backgroundobjects" svg:width="24.957cm" svg:height="4.762cm" draw:transform="skewX (3.13378905573492E-017) rotate (0.142244334037538) translate (1.688cm 11.524cm)">
        <draw:text-box>
          <text:p/>
        </draw:text-box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frame presentation:style-name="Prog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8T13:39:29.901117600</meta:creation-date>
    <dc:description>This work is licensed under a Creative Commons 0 License.
It makes use of the works of Alexander Wilms.</dc:description>
    <meta:generator>LibreOffice/26.2.4.2$Windows_X86_64 LibreOffice_project/0229ac93fcf0d7cbc6376066c6f35021cef002dc</meta:generator>
    <dc:title>DNA</dc:title>
    <meta:editing-duration>PT58M52S</meta:editing-duration>
    <meta:editing-cycles>11</meta:editing-cycles>
    <dc:date>2026-07-02T16:17:58.715078000</dc:date>
    <meta:document-statistic meta:object-count="162"/>
  </office:meta>
</office:document-meta>
</file>