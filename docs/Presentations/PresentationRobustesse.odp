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3B0000053357955C95.png" manifest:media-type="image/png"/>
  <manifest:file-entry manifest:full-path="Pictures/100000000000083B00000533A8CCD4A4.png" manifest:media-type="image/png"/>
  <manifest:file-entry manifest:full-path="Pictures/100000000000083B000005339D72A55E.png" manifest:media-type="image/png"/>
  <manifest:file-entry manifest:full-path="Pictures/10000000000002A7000001CC4740ACA9.png" manifest:media-type="image/png"/>
  <manifest:file-entry manifest:full-path="Pictures/1000000000000A1F000007CD360E5D91.png" manifest:media-type="image/png"/>
  <manifest:file-entry manifest:full-path="Pictures/100000000000083B0000053303F5C92E.png" manifest:media-type="image/png"/>
  <manifest:file-entry manifest:full-path="Pictures/100000000000083B00000533CEF8C4A3.png" manifest:media-type="image/png"/>
  <manifest:file-entry manifest:full-path="Pictures/1000000000000A1F000007CDC5B603FD.png" manifest:media-type="image/png"/>
  <manifest:file-entry manifest:full-path="Pictures/1000000000000A1F000007CDF547AC23.png" manifest:media-type="image/png"/>
  <manifest:file-entry manifest:full-path="Pictures/1000000000000A1F000007CD2DDED5A6.png" manifest:media-type="image/png"/>
  <manifest:file-entry manifest:full-path="Pictures/100000000000083B0000053366B62ECF.png" manifest:media-type="image/png"/>
  <manifest:file-entry manifest:full-path="Pictures/1000000000000A1F000007CD225FE2F7.png" manifest:media-type="image/png"/>
  <manifest:file-entry manifest:full-path="Pictures/1000000000000A37000007CD2559838F.png" manifest:media-type="image/png"/>
  <manifest:file-entry manifest:full-path="Pictures/1000000000000830000005335CE4DCA0.png" manifest:media-type="image/png"/>
  <manifest:file-entry manifest:full-path="Pictures/1000000000000A1F000007CD7A32EE20.png" manifest:media-type="image/png"/>
  <manifest:file-entry manifest:full-path="Pictures/100000000000083B00000533BBD28A46.png" manifest:media-type="image/png"/>
  <manifest:file-entry manifest:full-path="Pictures/1000000000000A1F000007CD156D8860.png" manifest:media-type="image/png"/>
  <manifest:file-entry manifest:full-path="Pictures/100000000000083000000533516090E8.png" manifest:media-type="image/png"/>
  <manifest:file-entry manifest:full-path="Pictures/1000000000000A1F000007CD8E8D3CC4.png" manifest:media-type="image/png"/>
  <manifest:file-entry manifest:full-path="Pictures/100000000000083B000005335A77AF64.png" manifest:media-type="image/png"/>
  <manifest:file-entry manifest:full-path="Pictures/1000000000000A37000007CDE9131FA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17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objectwithoutfill">
      <style:graphic-properties svg:stroke-width="0.2cm" svg:stroke-color="#ff4000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41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89cm" fo:min-width="0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36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standard">
      <style:graphic-properties svg:stroke-color="#ff4000" draw:opacity="0%" draw:textarea-horizontal-align="justify" draw:textarea-vertical-align="middle" draw:auto-grow-height="false" fo:min-height="0.95cm" fo:min-width="0.8cm" draw:shadow-opacity="0%" loext:decorative="false"/>
    </style:style>
    <style:style style:name="gr13" style:family="graphic" style:parent-style-name="objectwithoutfill">
      <style:graphic-properties draw:marker-end="Extrémités_20_de_20_flèche_20_1" draw:marker-end-width="0.2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2" draw:marker-end-width="0.2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3" draw:marker-end-width="0.2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pr1" style:family="presentation" style:parent-style-name="Standard-title">
      <style:graphic-properties fo:min-height="4.726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title">
      <style:graphic-properties fo:min-height="2.629cm" loext:decorative="false"/>
      <style:paragraph-properties style:writing-mode="lr-tb"/>
    </style:style>
    <style:style style:name="pr5" style:family="presentation" style:parent-style-name="Standard-title">
      <style:graphic-properties fo:min-height="1.737cm" loext:decorative="false"/>
      <style:paragraph-properties style:writing-mode="lr-tb"/>
    </style:style>
    <style:style style:name="pr6" style:family="presentation" style:parent-style-name="Standard-outline1">
      <style:graphic-properties fo:min-height="8.884cm" loext:decorative="false"/>
      <style:paragraph-properties style:writing-mode="lr-tb"/>
    </style:style>
    <style:style style:name="pr7" style:family="presentation" style:parent-style-name="Standard-title">
      <style:graphic-properties fo:min-height="3.473cm" loext:decorative="false"/>
      <style:paragraph-properties style:writing-mode="lr-tb"/>
    </style:style>
    <style:style style:name="pr8" style:family="presentation" style:parent-style-name="Standard-title">
      <style:graphic-properties fo:min-height="4.725cm" loext:decorative="false"/>
      <style:paragraph-properties style:writing-mode="lr-tb"/>
    </style:style>
    <style:style style:name="pr9" style:family="presentation" style:parent-style-name="Standard-title">
      <style:graphic-properties fo:min-height="3.54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30pt" style:font-size-asian="30pt" style:font-size-complex="3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SC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SC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4000" loext:opacity="100%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4000" loext:opacity="100%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4.726cm" svg:x="1.301cm" svg:y="1cm" presentation:class="title" presentation:user-transformed="true">
          <draw:text-box>
            <text:p text:style-name="P1"><text:span text:style-name="T1">LMI-Based Multirate Steady-State Kalman Filter Design: Comparison of Offline and Recursive Gains </text:span></text:p>
          </draw:text-box>
        </draw:frame>
        <draw:frame presentation:style-name="pr2" draw:text-style-name="P2" draw:layer="layout" svg:width="25.199cm" svg:height="9.134cm" svg:x="1.301cm" svg:y="6.366cm" presentation:class="subtitle" presentation:user-transformed="true">
          <draw:text-box>
            <text:p><text:span text:style-name="T2">Robustness Simulation</text:span></text:p>
          </draw:text-box>
        </draw:frame>
        <draw:frame draw:style-name="gr1" draw:text-style-name="P3" draw:layer="layout" svg:width="7.699cm" svg:height="1.5cm" svg:x="1.301cm" svg:y="14.5cm">
          <draw:text-box>
            <text:p>Léo AHMED MUSHTAQ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 nominal case</text:p>
          </draw:text-box>
        </draw:frame>
        <draw:frame draw:style-name="gr3" draw:text-style-name="P5" draw:layer="layout" svg:width="17.964cm" svg:height="12.17cm" svg:x="5cm" svg:y="3.33cm">
          <draw:image xlink:href="Pictures/10000000000002A7000001CC4740ACA9.png" xlink:type="simple" xlink:show="embed" xlink:actuate="onLoad" draw:mime-type="image/png">
            <text:p/>
          </draw:image>
        </draw:frame>
        <draw:frame draw:style-name="gr4" draw:text-style-name="P7" draw:layer="layout" svg:width="5cm" svg:height="1.427cm" svg:x="21.5cm" svg:y="14.573cm">
          <draw:text-box>
            <text:p text:style-name="P6"><text:span text:style-name="T3">= diag(1.0, 0.1)</text:span></text:p>
          </draw:text-box>
        </draw:frame>
        <draw:frame draw:style-name="gr5" draw:text-style-name="P3" draw:layer="layout" svg:width="10.5cm" svg:height="1.673cm" svg:x="5.5cm" svg:y="7.5cm">
          <draw:text-box>
            <text:p>Initial covariance P0 = diag(1, 1, 1)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Nominal case</text:p>
          </draw:text-box>
        </draw:frame>
        <draw:frame draw:style-name="gr3" draw:text-style-name="P5" draw:layer="layout" svg:width="20.838cm" svg:height="13.163cm" svg:x="3.5cm" svg:y="2.5cm">
          <draw:image xlink:href="Pictures/100000000000083B000005339D72A55E.png" xlink:type="simple" xlink:show="embed" xlink:actuate="onLoad" draw:mime-type="image/png">
            <text:p/>
          </draw:image>
        </draw:frame>
        <draw:line draw:style-name="gr6" draw:text-style-name="P5" draw:layer="layout" svg:x1="24cm" svg:y1="13cm" svg:x2="8.5cm" svg:y2="13cm">
          <text:p/>
        </draw:line>
        <draw:line draw:style-name="gr6" draw:text-style-name="P5" draw:layer="layout" svg:x1="24cm" svg:y1="14cm" svg:x2="8.5cm" svg:y2="14cm">
          <text:p/>
        </draw:line>
        <draw:frame draw:style-name="gr7" draw:text-style-name="P8" draw:layer="layout" svg:width="1.841cm" svg:height="0.839cm" svg:x="24cm" svg:y="12.538cm">
          <draw:text-box>
            <text:p><text:span text:style-name="T4">~</text:span><text:span text:style-name="T3">1,65</text:span></text:p>
          </draw:text-box>
        </draw:frame>
        <draw:frame draw:style-name="gr7" draw:text-style-name="P8" draw:layer="layout" svg:width="1.841cm" svg:height="0.839cm" svg:x="23.968cm" svg:y="13.661cm">
          <draw:text-box>
            <text:p text:style-name="P9"><text:span text:style-name="T4">~1,5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 text:style-name="P10">Nominal case</text:p>
          </draw:text-box>
        </draw:frame>
        <draw:frame draw:style-name="gr3" draw:text-style-name="P5" draw:layer="layout" svg:width="17.5cm" svg:height="13.488cm" svg:x="5cm" svg:y="2.262cm">
          <draw:image xlink:href="Pictures/1000000000000A1F000007CD360E5D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6.871cm" presentation:class="title" presentation:user-transformed="true">
          <draw:text-box>
            <text:p>Periodic impact (N)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4.5cm" svg:height="1.737cm" svg:x="22.5cm" svg:y="6.263cm" presentation:class="title" presentation:user-transformed="true">
          <draw:text-box>
            <text:p>N=1</text:p>
          </draw:text-box>
        </draw:frame>
        <draw:frame draw:style-name="gr3" draw:text-style-name="P5" draw:layer="layout" svg:width="20.579cm" svg:height="13cm" svg:x="0.5cm" svg:y="1.5cm">
          <draw:image xlink:href="Pictures/100000000000083B00000533CEF8C4A3.png" xlink:type="simple" xlink:show="embed" xlink:actuate="onLoad" draw:mime-type="image/png">
            <text:p/>
          </draw:image>
        </draw:frame>
        <draw:frame draw:style-name="gr8" draw:text-style-name="P11" draw:layer="layout" svg:width="1.841cm" svg:height="1.139cm" svg:x="20.879cm" svg:y="11.7cm">
          <draw:text-box>
            <text:p text:style-name="P9"><text:span text:style-name="T4">~1,38</text:span></text:p>
          </draw:text-box>
        </draw:frame>
        <draw:frame draw:style-name="gr9" draw:text-style-name="P12" draw:layer="layout" svg:width="6.644cm" svg:height="2.613cm" svg:x="21.5cm" svg:y="8cm">
          <draw:text-box>
            <text:p><text:span text:style-name="T5">No sawtoot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6cm" svg:height="2.629cm" svg:x="20.9cm" svg:y="6.413cm" presentation:class="title" presentation:user-transformed="true">
          <draw:text-box>
            <text:p>N=1</text:p>
          </draw:text-box>
        </draw:frame>
        <draw:frame draw:style-name="gr3" draw:text-style-name="P5" draw:layer="layout" svg:width="19.842cm" svg:height="15.293cm" svg:x="0.266cm" svg:y="0.207cm">
          <draw:image xlink:href="Pictures/1000000000000A1F000007CDF547AC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5.1cm" svg:height="2.629cm" svg:x="22.3cm" svg:y="6.371cm" presentation:class="title" presentation:user-transformed="true">
          <draw:text-box>
            <text:p>N=5</text:p>
          </draw:text-box>
        </draw:frame>
        <draw:frame draw:style-name="gr3" draw:text-style-name="P5" draw:layer="layout" svg:width="21.5cm" svg:height="13.582cm" svg:x="0.5cm" svg:y="0.918cm">
          <draw:image xlink:href="Pictures/100000000000083B00000533A8CCD4A4.png" xlink:type="simple" xlink:show="embed" xlink:actuate="onLoad" draw:mime-type="image/png">
            <text:p/>
          </draw:image>
        </draw:frame>
        <draw:line draw:style-name="gr6" draw:text-style-name="P5" draw:layer="layout" svg:x1="22.5cm" svg:y1="12cm" svg:x2="7cm" svg:y2="12cm">
          <text:p/>
        </draw:line>
        <draw:line draw:style-name="gr6" draw:text-style-name="P5" draw:layer="layout" svg:x1="22.5cm" svg:y1="12.7cm" svg:x2="7cm" svg:y2="12.7cm">
          <text:p/>
        </draw:line>
        <draw:frame draw:style-name="gr7" draw:text-style-name="P8" draw:layer="layout" svg:width="1.841cm" svg:height="0.839cm" svg:x="22.5cm" svg:y="11.4cm">
          <draw:text-box>
            <text:p><text:span text:style-name="T4">~</text:span><text:span text:style-name="T3">1,52</text:span></text:p>
          </draw:text-box>
        </draw:frame>
        <draw:frame draw:style-name="gr7" draw:text-style-name="P8" draw:layer="layout" svg:width="1.841cm" svg:height="0.839cm" svg:x="22.5cm" svg:y="12.461cm">
          <draw:text-box>
            <text:p><text:span text:style-name="T4">~</text:span><text:span text:style-name="T3">1,4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5.1cm" svg:height="2.629cm" svg:x="22.3cm" svg:y="6.372cm" presentation:class="title" presentation:user-transformed="true">
          <draw:text-box>
            <text:p>N=5</text:p>
          </draw:text-box>
        </draw:frame>
        <draw:frame draw:style-name="gr3" draw:text-style-name="P5" draw:layer="layout" svg:width="19.934cm" svg:height="15.364cm" svg:x="1.566cm" svg:y="0.136cm">
          <draw:image xlink:href="Pictures/1000000000000A1F000007CDC5B603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5.1cm" svg:height="2.629cm" svg:x="22.5cm" svg:y="6.5cm" presentation:class="title" presentation:user-transformed="true">
          <draw:text-box>
            <text:p>N=20</text:p>
          </draw:text-box>
        </draw:frame>
        <draw:frame draw:style-name="gr3" draw:text-style-name="P5" draw:layer="layout" svg:width="22.954cm" svg:height="14.5cm" svg:x="0.046cm" svg:y="0.6cm">
          <draw:image xlink:href="Pictures/100000000000083B0000053303F5C92E.png" xlink:type="simple" xlink:show="embed" xlink:actuate="onLoad" draw:mime-type="image/png">
            <text:p/>
          </draw:image>
        </draw:frame>
        <draw:line draw:style-name="gr6" draw:text-style-name="P5" draw:layer="layout" svg:x1="23.5cm" svg:y1="11.1cm" svg:x2="8cm" svg:y2="11.1cm">
          <text:p/>
        </draw:line>
        <draw:line draw:style-name="gr6" draw:text-style-name="P5" draw:layer="layout" svg:x1="23.5cm" svg:y1="13.3cm" svg:x2="8cm" svg:y2="13.3cm">
          <text:p/>
        </draw:line>
        <draw:frame draw:style-name="gr7" draw:text-style-name="P8" draw:layer="layout" svg:width="1.841cm" svg:height="0.839cm" svg:x="23.5cm" svg:y="10.7cm">
          <draw:text-box>
            <text:p><text:span text:style-name="T4">~</text:span><text:span text:style-name="T3">1,85</text:span></text:p>
          </draw:text-box>
        </draw:frame>
        <draw:frame draw:style-name="gr7" draw:text-style-name="P8" draw:layer="layout" svg:width="1.841cm" svg:height="0.839cm" svg:x="23.5cm" svg:y="12.9cm">
          <draw:text-box>
            <text:p><text:span text:style-name="T4">~</text:span><text:span text:style-name="T3">1,6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5.1cm" svg:height="2.629cm" svg:x="22.3cm" svg:y="6.372cm" presentation:class="title" presentation:user-transformed="true">
          <draw:text-box>
            <text:p>N=20</text:p>
          </draw:text-box>
        </draw:frame>
        <draw:frame draw:style-name="gr3" draw:text-style-name="P5" draw:layer="layout" svg:width="20.026cm" svg:height="15.435cm" svg:x="1.5cm" svg:y="0.165cm">
          <draw:image xlink:href="Pictures/1000000000000A1F000007CD2DDED5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6">Larger N --&gt; longer GPS outage </text:span><text:span text:style-name="T1">--&gt; higher steady-state uncertainty. </text:span></text:p>
              </text:list-item>
              <text:list-item>
                <text:p text:style-name="P6"><text:span text:style-name="T1">The sawtooth amplitude grows monotonically with N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801cm" svg:y="6.5cm" presentation:class="title" presentation:user-transformed="true">
          <draw:text-box>
            <text:p>Initial Covariance Impact (P0)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7" draw:layer="layout" svg:width="5.4cm" svg:height="3.473cm" svg:x="22cm" svg:y="5.95cm" presentation:class="title" presentation:user-transformed="true">
          <draw:text-box>
            <text:p>P0 = Id<text:span text:style-name="T7">*0,1</text:span></text:p>
          </draw:text-box>
        </draw:frame>
        <draw:frame draw:style-name="gr3" draw:text-style-name="P5" draw:layer="layout" svg:width="22.164cm" svg:height="14cm" svg:x="0.4cm" svg:y="1cm">
          <draw:image xlink:href="Pictures/100000000000083B0000053366B62ECF.png" xlink:type="simple" xlink:show="embed" xlink:actuate="onLoad" draw:mime-type="image/png">
            <text:p/>
          </draw:image>
        </draw:frame>
        <draw:line draw:style-name="gr6" draw:text-style-name="P5" draw:layer="layout" svg:x1="23.359cm" svg:y1="2.4cm" svg:x2="7.859cm" svg:y2="2.4cm">
          <text:p/>
        </draw:line>
        <draw:line draw:style-name="gr6" draw:text-style-name="P5" draw:layer="layout" svg:x1="23.359cm" svg:y1="3.6cm" svg:x2="7.859cm" svg:y2="3.6cm">
          <text:p/>
        </draw:line>
        <draw:frame draw:style-name="gr7" draw:text-style-name="P8" draw:layer="layout" svg:width="1.841cm" svg:height="0.839cm" svg:x="23.259cm" svg:y="2cm">
          <draw:text-box>
            <text:p><text:span text:style-name="T4">~</text:span><text:span text:style-name="T3">1,65</text:span></text:p>
          </draw:text-box>
        </draw:frame>
        <draw:frame draw:style-name="gr7" draw:text-style-name="P8" draw:layer="layout" svg:width="1.841cm" svg:height="0.839cm" svg:x="23.359cm" svg:y="3.2cm">
          <draw:text-box>
            <text:p><text:span text:style-name="T4">~</text:span><text:span text:style-name="T3">1,5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20.3cm" svg:height="15.502cm" svg:x="0.2cm" svg:y="0.198cm">
          <draw:image xlink:href="Pictures/1000000000000A37000007CD2559838F.png" xlink:type="simple" xlink:show="embed" xlink:actuate="onLoad" draw:mime-type="image/png">
            <text:p/>
          </draw:image>
        </draw:frame>
        <draw:frame presentation:style-name="pr7" draw:layer="layout" svg:width="5.4cm" svg:height="3.473cm" svg:x="22cm" svg:y="5.951cm" presentation:class="title" presentation:user-transformed="true">
          <draw:text-box>
            <text:p>P0 = Id<text:span text:style-name="T7">*0,1</text:span></text:p>
          </draw:text-box>
        </draw:frame>
        <draw:frame draw:style-name="gr10" draw:text-style-name="P3" draw:layer="layout" svg:width="5cm" svg:height="2.384cm" svg:x="20.5cm" svg:y="3cm">
          <draw:text-box>
            <text:p>Initial gain value is very good <text:s/></text:p>
          </draw:text-box>
        </draw:frame>
        <draw:line draw:style-name="gr11" draw:text-style-name="P5" draw:layer="layout" svg:x1="20.5cm" svg:y1="4cm" svg:x2="12.2cm" svg:y2="1.8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7" draw:layer="layout" svg:width="5.4cm" svg:height="3.473cm" svg:x="22cm" svg:y="5.951cm" presentation:class="title" presentation:user-transformed="true">
          <draw:text-box>
            <text:p>P0 = Id<text:span text:style-name="T7">*10</text:span></text:p>
          </draw:text-box>
        </draw:frame>
        <draw:frame draw:style-name="gr3" draw:text-style-name="P5" draw:layer="layout" svg:width="22.835cm" svg:height="14.5cm" svg:x="0.065cm" svg:y="0.5cm">
          <draw:image xlink:href="Pictures/1000000000000830000005335CE4DCA0.png" xlink:type="simple" xlink:show="embed" xlink:actuate="onLoad" draw:mime-type="image/png">
            <text:p/>
          </draw:image>
        </draw:frame>
        <draw:frame draw:style-name="gr7" draw:text-style-name="P8" draw:layer="layout" svg:width="1.841cm" svg:height="0.839cm" svg:x="22.701cm" svg:y="12.501cm">
          <draw:text-box>
            <text:p><text:span text:style-name="T4">~</text:span><text:span text:style-name="T3">1,65</text:span></text:p>
          </draw:text-box>
        </draw:frame>
        <draw:custom-shape draw:style-name="gr12" draw:text-style-name="P14" draw:layer="layout" svg:width="1.3cm" svg:height="1.2cm" svg:x="0.3cm" svg:y="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7" draw:layer="layout" svg:width="5.4cm" svg:height="3.473cm" svg:x="22cm" svg:y="5.951cm" presentation:class="title" presentation:user-transformed="true">
          <draw:text-box>
            <text:p>P0 = Id<text:span text:style-name="T7">*10</text:span></text:p>
          </draw:text-box>
        </draw:frame>
        <draw:frame draw:style-name="gr3" draw:text-style-name="P5" draw:layer="layout" svg:width="20.3cm" svg:height="15.646cm" svg:x="0.2cm" svg:y="0.103cm">
          <draw:image xlink:href="Pictures/1000000000000A1F000007CD7A32EE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P0 only affects the transient.</text:span></text:p>
              </text:list-item>
              <text:list-item>
                <text:p text:style-name="P6"><text:span text:style-name="T1"><text:s/>Regardless of initial uncertainty (×0.1 or ×10), the filter always converges to the same periodic steady state. </text:span></text:p>
                <text:p text:style-name="P6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7" draw:text-style-name="P15" draw:layer="layout" svg:width="25.199cm" svg:height="3.473cm" svg:x="1.801cm" svg:y="6.078cm" presentation:class="title" presentation:user-transformed="true">
          <draw:text-box>
            <text:p text:style-name="P6"><text:span text:style-name="T8">Process Noise Covariance Impact (Q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8" draw:text-style-name="P16" draw:layer="layout" svg:width="5.4cm" svg:height="4.725cm" svg:x="22cm" svg:y="5.526cm" presentation:class="title" presentation:user-transformed="true">
          <draw:text-box>
            <text:p text:style-name="P6"><text:span text:style-name="T5">Q = diag([0.01, 0.1, 0.5]) </text:span><text:span text:style-name="T9">* 0,1</text:span></text:p>
          </draw:text-box>
        </draw:frame>
        <draw:frame draw:style-name="gr3" draw:text-style-name="P5" draw:layer="layout" svg:width="21.838cm" svg:height="13.794cm" svg:x="0.062cm" svg:y="1.006cm">
          <draw:image xlink:href="Pictures/100000000000083B00000533BBD28A46.png" xlink:type="simple" xlink:show="embed" xlink:actuate="onLoad" draw:mime-type="image/png">
            <text:p/>
          </draw:image>
        </draw:frame>
        <draw:frame draw:style-name="gr7" draw:text-style-name="P8" draw:layer="layout" svg:width="1.841cm" svg:height="0.839cm" svg:x="21.801cm" svg:y="11.801cm">
          <draw:text-box>
            <text:p><text:span text:style-name="T4">~0,3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8" draw:text-style-name="P16" draw:layer="layout" svg:width="5.4cm" svg:height="4.725cm" svg:x="21.7cm" svg:y="5.627cm" presentation:class="title" presentation:user-transformed="true">
          <draw:text-box>
            <text:p text:style-name="P6"><text:span text:style-name="T5">Q = diag([0.01, 0.1, 0.5]) </text:span><text:span text:style-name="T9">* 0,1</text:span></text:p>
          </draw:text-box>
        </draw:frame>
        <draw:frame draw:style-name="gr3" draw:text-style-name="P5" draw:layer="layout" svg:width="20cm" svg:height="15.415cm" svg:x="0.2cm" svg:y="0.335cm">
          <draw:image xlink:href="Pictures/1000000000000A1F000007CD156D8860.png" xlink:type="simple" xlink:show="embed" xlink:actuate="onLoad" draw:mime-type="image/png">
            <text:p/>
          </draw:image>
        </draw:frame>
        <draw:line draw:style-name="gr13" draw:text-style-name="P5" draw:layer="layout" svg:x1="22cm" svg:y1="4cm" svg:x2="19.1cm" svg:y2="6.8cm">
          <text:p/>
        </draw:line>
        <draw:frame draw:style-name="gr14" draw:text-style-name="P3" draw:layer="layout" svg:width="8.015cm" svg:height="1.673cm" svg:x="19.985cm" svg:y="2.327cm">
          <draw:text-box>
            <text:p>Low gain as the model is nearly perfect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22.047cm" svg:height="14cm" svg:x="0.2cm" svg:y="0.8cm">
          <draw:image xlink:href="Pictures/100000000000083000000533516090E8.png" xlink:type="simple" xlink:show="embed" xlink:actuate="onLoad" draw:mime-type="image/png">
            <text:p/>
          </draw:image>
        </draw:frame>
        <draw:frame presentation:style-name="pr8" draw:text-style-name="P16" draw:layer="layout" svg:width="5.4cm" svg:height="4.725cm" svg:x="22cm" svg:y="5.327cm" presentation:class="title" presentation:user-transformed="true">
          <draw:text-box>
            <text:p text:style-name="P6"><text:span text:style-name="T5">Q = diag([0.01, 0.1, 0.5]) </text:span><text:span text:style-name="T9">* 10</text:span></text:p>
          </draw:text-box>
        </draw:frame>
        <draw:line draw:style-name="gr6" draw:text-style-name="P5" draw:layer="layout" svg:x1="23cm" svg:y1="1.761cm" svg:x2="7.5cm" svg:y2="1.761cm">
          <text:p/>
        </draw:line>
        <draw:line draw:style-name="gr6" draw:text-style-name="P5" draw:layer="layout" svg:x1="23cm" svg:y1="3.061cm" svg:x2="7.5cm" svg:y2="3.061cm">
          <text:p/>
        </draw:line>
        <draw:frame draw:style-name="gr7" draw:text-style-name="P8" draw:layer="layout" svg:width="1.841cm" svg:height="0.839cm" svg:x="23cm" svg:y="1.361cm">
          <draw:text-box>
            <text:p><text:span text:style-name="T4">~</text:span><text:span text:style-name="T3">13,3</text:span></text:p>
          </draw:text-box>
        </draw:frame>
        <draw:frame draw:style-name="gr7" draw:text-style-name="P8" draw:layer="layout" svg:width="1.841cm" svg:height="0.839cm" svg:x="23cm" svg:y="2.661cm">
          <draw:text-box>
            <text:p><text:span text:style-name="T4">~12,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8" draw:text-style-name="P16" draw:layer="layout" svg:width="5.4cm" svg:height="4.725cm" svg:x="22cm" svg:y="5.327cm" presentation:class="title" presentation:user-transformed="true">
          <draw:text-box>
            <text:p text:style-name="P6"><text:span text:style-name="T5">Q = diag([0.01, 0.1, 0.5]) </text:span><text:span text:style-name="T9">* 10</text:span></text:p>
          </draw:text-box>
        </draw:frame>
        <draw:frame draw:style-name="gr3" draw:text-style-name="P5" draw:layer="layout" svg:width="20.093cm" svg:height="15.486cm" svg:x="0.207cm" svg:y="0.192cm">
          <draw:image xlink:href="Pictures/1000000000000A1F000007CD225FE2F7.png" xlink:type="simple" xlink:show="embed" xlink:actuate="onLoad" draw:mime-type="image/png">
            <text:p/>
          </draw:image>
        </draw:frame>
        <draw:line draw:style-name="gr15" draw:text-style-name="P5" draw:layer="layout" svg:x1="21.5cm" svg:y1="3.5cm" svg:x2="18cm" svg:y2="6cm">
          <text:p/>
        </draw:line>
        <draw:frame draw:style-name="gr16" draw:text-style-name="P3" draw:layer="layout" svg:width="7.298cm" svg:height="2.384cm" svg:x="20.202cm" svg:y="1.116cm">
          <draw:text-box>
            <text:p>Higher gain compared to the nomial one (was 0,65)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6">Q tunes the balance between model trust and sensor trust. </text:span></text:p>
              </text:list-item>
              <text:list-item>
                <text:p text:style-name="P6"><text:span text:style-name="T6">High Q </text:span><text:span text:style-name="T1">--&gt; filter relies on measurements, gains rise and steady-state uncertainty explodes. </text:span></text:p>
              </text:list-item>
              <text:list-item>
                <text:p text:style-name="P6"><text:span text:style-name="T1">Q has the largest effect on trace(P) of all tested parameters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7" draw:text-style-name="P15" draw:layer="layout" svg:width="25.199cm" svg:height="3.473cm" svg:x="1.4cm" svg:y="6.206cm" presentation:class="title" presentation:user-transformed="true">
          <draw:text-box>
            <text:p text:style-name="P6"><text:span text:style-name="T8">Measurement Noise Covariance Impact (R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9" draw:text-style-name="P16" draw:layer="layout" svg:width="5.4cm" svg:height="3.544cm" svg:x="22cm" svg:y="5.918cm" presentation:class="title" presentation:user-transformed="true">
          <draw:text-box>
            <text:p text:style-name="P6"><text:span text:style-name="T5">R = diag([1, 0.1]) </text:span><text:span text:style-name="T9">* 0,1</text:span></text:p>
          </draw:text-box>
        </draw:frame>
        <draw:frame draw:style-name="gr3" draw:text-style-name="P5" draw:layer="layout" svg:width="22.163cm" svg:height="14cm" svg:x="0.1cm" svg:y="0.8cm">
          <draw:image xlink:href="Pictures/100000000000083B0000053357955C95.png" xlink:type="simple" xlink:show="embed" xlink:actuate="onLoad" draw:mime-type="image/png">
            <text:p/>
          </draw:image>
        </draw:frame>
        <draw:line draw:style-name="gr6" draw:text-style-name="P5" draw:layer="layout" svg:x1="23.001cm" svg:y1="12.201cm" svg:x2="7.501cm" svg:y2="12.201cm">
          <text:p/>
        </draw:line>
        <draw:line draw:style-name="gr6" draw:text-style-name="P5" draw:layer="layout" svg:x1="23.001cm" svg:y1="13.301cm" svg:x2="7.501cm" svg:y2="13.301cm">
          <text:p/>
        </draw:line>
        <draw:frame draw:style-name="gr7" draw:text-style-name="P8" draw:layer="layout" svg:width="1.841cm" svg:height="0.839cm" svg:x="22.901cm" svg:y="11.801cm">
          <draw:text-box>
            <text:p><text:span text:style-name="T4">~</text:span><text:span text:style-name="T3">1,33</text:span></text:p>
          </draw:text-box>
        </draw:frame>
        <draw:frame draw:style-name="gr7" draw:text-style-name="P8" draw:layer="layout" svg:width="1.841cm" svg:height="0.839cm" svg:x="22.901cm" svg:y="12.901cm">
          <draw:text-box>
            <text:p><text:span text:style-name="T4">~</text:span><text:span text:style-name="T3">1,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9" draw:text-style-name="P16" draw:layer="layout" svg:width="5.4cm" svg:height="3.544cm" svg:x="22cm" svg:y="5.918cm" presentation:class="title" presentation:user-transformed="true">
          <draw:text-box>
            <text:p text:style-name="P6"><text:span text:style-name="T5">R = diag([1, 0.1]) </text:span><text:span text:style-name="T9">* 0,1</text:span></text:p>
          </draw:text-box>
        </draw:frame>
        <draw:frame draw:style-name="gr3" draw:text-style-name="P5" draw:layer="layout" svg:width="20.129cm" svg:height="15.514cm" svg:x="0.566cm" svg:y="0.1cm">
          <draw:image xlink:href="Pictures/1000000000000A1F000007CD8E8D3CC4.png" xlink:type="simple" xlink:show="embed" xlink:actuate="onLoad" draw:mime-type="image/png">
            <text:p/>
          </draw:image>
        </draw:frame>
        <draw:line draw:style-name="gr17" draw:text-style-name="P5" draw:layer="layout" svg:x1="21.5cm" svg:y1="4cm" svg:x2="18cm" svg:y2="6.5cm">
          <text:p/>
        </draw:line>
        <draw:frame draw:style-name="gr18" draw:text-style-name="P3" draw:layer="layout" svg:width="7.915cm" svg:height="2cm" svg:x="20.5cm" svg:y="2.5cm">
          <draw:text-box>
            <text:p>High gain as the sensor output are reliabl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9" draw:text-style-name="P16" draw:layer="layout" svg:width="5.4cm" svg:height="3.544cm" svg:x="22.2cm" svg:y="5.918cm" presentation:class="title" presentation:user-transformed="true">
          <draw:text-box>
            <text:p text:style-name="P6"><text:span text:style-name="T5">R = diag([1, 0.1]) </text:span><text:span text:style-name="T9">* 10</text:span></text:p>
          </draw:text-box>
        </draw:frame>
        <draw:frame draw:style-name="gr3" draw:text-style-name="P5" draw:layer="layout" svg:width="22.5cm" svg:height="14.213cm" svg:x="0.1cm" svg:y="0.787cm">
          <draw:image xlink:href="Pictures/100000000000083B000005335A77AF64.png" xlink:type="simple" xlink:show="embed" xlink:actuate="onLoad" draw:mime-type="image/png">
            <text:p/>
          </draw:image>
        </draw:frame>
        <draw:frame draw:style-name="gr10" draw:text-style-name="P3" draw:layer="layout" svg:width="4cm" svg:height="2.384cm" svg:x="23cm" svg:y="1.616cm">
          <draw:text-box>
            <text:p>Not Converging for k = 200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9" draw:text-style-name="P16" draw:layer="layout" svg:width="5.4cm" svg:height="3.544cm" svg:x="22cm" svg:y="5.918cm" presentation:class="title" presentation:user-transformed="true">
          <draw:text-box>
            <text:p text:style-name="P6"><text:span text:style-name="T5">R = diag([1, 0.1]) </text:span><text:span text:style-name="T9">* 10</text:span></text:p>
          </draw:text-box>
        </draw:frame>
        <draw:frame draw:style-name="gr3" draw:text-style-name="P5" draw:layer="layout" svg:width="20.156cm" svg:height="15.392cm" svg:x="0.244cm" svg:y="0.108cm">
          <draw:image xlink:href="Pictures/1000000000000A37000007CDE9131F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R×0.1 improves accuracy modestly. </text:span></text:p>
              </text:list-item>
              <text:list-item>
                <text:p text:style-name="P6"><text:span text:style-name="T1">R×10 is a practical limitation: the periodic steady state is not reached within 200 steps. </text:span></text:p>
              </text:list-item>
              <text:list-item>
                <text:p text:style-name="P6"><text:span text:style-name="T1">When sensors are too unreliable, convergence is too slow for the simulation horizon <text:s/>the filter is theoretically stable but practically unusable at this timescale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The filter is robust with the initialisation but sensitive to the noise process and might not converge in the wanted time lenght if the sensors are not relia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 d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Faire une simulation avec Q et R élevé .</text:p>
              </text:list-header>
            </text:list>
            <text:p/>
            <text:p>Faire un tableau pour mettre en evidence les valeurs haute et basse de la trace de P. Pour chaque cas . Ainsi que pour les gains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1" draw:display-name="Arrowheads 1" svg:viewBox="0 0 20 20" svg:d="M0 20l10-20 10 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1T14:53:02.773276000</meta:creation-date>
    <dc:date>2026-07-02T16:18:25.340025200</dc:date>
    <meta:editing-duration>PT3H16M40S</meta:editing-duration>
    <meta:editing-cycles>25</meta:editing-cycles>
    <meta:generator>LibreOffice/26.2.4.2$Windows_X86_64 LibreOffice_project/0229ac93fcf0d7cbc6376066c6f35021cef002dc</meta:generator>
    <meta:document-statistic meta:object-count="186"/>
  </office:meta>
</office:document-meta>
</file>